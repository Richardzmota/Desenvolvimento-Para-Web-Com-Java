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Fonteparág.padrão" style:family="text">
      <style:text-properties fo:language="en" fo:country="US"/>
    </style:style>
  </office:automatic-styles>
  <office:body>
    <office:text text:use-soft-page-breaks="true">
      <text:p text:style-name="P1">CREATE DATABASE IF NOT EXISTS loja_eletronicos;</text:p>
      <text:p text:style-name="P2">USE loja_eletronicos;</text:p>
      <text:p text:style-name="P3"/>
      <text:p text:style-name="P4">CREATE TABLE IF NOT EXISTS produto (</text:p>
      <text:p text:style-name="Normal"><text:span text:style-name="T5"><text:s text:c="4"/></text:span>id INT PRIMARY KEY,</text:p>
      <text:p text:style-name="Normal"><text:s text:c="4"/>nome VARCHAR(100) NOT NULL,</text:p>
      <text:p text:style-name="Normal"><text:s text:c="4"/>descricao TEXT,</text:p>
      <text:p text:style-name="Normal"><text:s text:c="4"/>preco DECIMAL(10, 2) NOT NULL</text:p>
      <text:p text:style-name="Normal">);</text:p>
      <text:p text:style-name="Normal"/>
      <text:p text:style-name="Normal">INSERT INTO produto (id, nome, descricao, preco) VALUES<text:s/></text:p>
      <text:p text:style-name="Normal">(1, 'Smartphone Samsung Galaxy', 'Tela 6.5 polegadas, 128GB de memória', 1850.00),</text:p>
      <text:p text:style-name="Normal">(2, 'Notebook Dell Inspiron', 'Processador i5, 8GB RAM, SSD 256GB', 4200.00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AELA MARCUCCI</meta:initial-creator>
    <dc:creator>MIKAELA MARCUCCI</dc:creator>
    <meta:creation-date>2026-04-18T00:11:00Z</meta:creation-date>
    <dc:date>2026-04-18T00:11:00Z</dc:date>
    <meta:template xlink:href="Normal" xlink:type="simple"/>
    <meta:editing-cycles>1</meta:editing-cycles>
    <meta:editing-duration>PT0S</meta:editing-duration>
    <meta:document-statistic meta:page-count="1" meta:paragraph-count="1" meta:word-count="68" meta:character-count="439" meta:row-count="3" meta:non-whitespace-character-count="372"/>
  </office:meta>
</office:document-meta>
</file>